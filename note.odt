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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aragraphedeliste" style:list-style-name="LFO1" style:family="paragraph"/>
    <style:style style:name="P3" style:parent-style-name="Paragraphedeliste" style:list-style-name="LFO1" style:family="paragraph"/>
    <style:style style:name="P4" style:parent-style-name="Paragraphedeliste" style:list-style-name="LFO1" style:family="paragraph"/>
    <style:style style:name="P5" style:parent-style-name="Paragraphedeliste" style:list-style-name="LFO1" style:family="paragraph"/>
    <style:style style:name="P6" style:parent-style-name="Paragraphedeliste" style:list-style-name="LFO1" style:family="paragraph"/>
    <style:style style:name="P7" style:parent-style-name="Paragraphedeliste" style:list-style-name="LFO1" style:family="paragraph"/>
    <style:style style:name="P8" style:parent-style-name="Paragraphedeliste" style:list-style-name="LFO2" style:family="paragraph"/>
    <style:style style:name="T9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10" style:parent-style-name="Paragraphedeliste" style:list-style-name="LFO2" style:family="paragraph"/>
    <style:style style:name="P11" style:parent-style-name="Paragraphedeliste" style:list-style-name="LFO2" style:family="paragraph">
      <style:text-properties fo:language="en" fo:country="GB"/>
    </style:style>
    <style:style style:name="P12" style:parent-style-name="Normal" style:family="paragraph">
      <style:text-properties fo:language="en" fo:country="GB"/>
    </style:style>
    <style:style style:name="P13" style:parent-style-name="Normal" style:family="paragraph">
      <style:text-properties fo:language="en" fo:country="GB"/>
    </style:style>
    <style:style style:name="P14" style:parent-style-name="Paragraphedeliste" style:list-style-name="LFO2" style:family="paragraph"/>
    <style:style style:name="P15" style:parent-style-name="Paragraphedeliste" style:list-style-name="LFO2" style:family="paragraph"/>
    <style:style style:name="P16" style:parent-style-name="Paragraphedeliste" style:list-style-name="LFO1" style:family="paragraph"/>
    <style:style style:name="P17" style:parent-style-name="Paragraphedeliste" style:list-style-name="LFO1" style:family="paragraph"/>
    <style:style style:name="T18" style:parent-style-name="Policepardéfaut" style:family="text">
      <style:text-properties fo:background-color="#FFFF00"/>
    </style:style>
    <style:style style:name="P19" style:parent-style-name="Paragraphedeliste" style:list-style-name="LFO1" style:family="paragraph"/>
    <style:style style:name="P20" style:parent-style-name="Paragraphedeliste" style:list-style-name="LFO1" style:family="paragraph"/>
    <style:style style:name="P21" style:parent-style-name="Normal" style:family="paragraph">
      <style:text-properties fo:language="en" fo:country="GB"/>
    </style:style>
    <style:style style:name="P22" style:parent-style-name="Paragraphedeliste" style:list-style-name="LFO1" style:family="paragraph">
      <style:text-properties fo:language="en" fo:country="GB"/>
    </style:style>
    <style:style style:name="P23" style:parent-style-name="Paragraphedeliste" style:list-style-name="LFO1" style:family="paragraph">
      <style:text-properties fo:language="en" fo:country="GB"/>
    </style:style>
    <style:style style:name="P24" style:parent-style-name="Paragraphedeliste" style:list-style-name="LFO3" style:family="paragraph">
      <style:text-properties fo:language="en" fo:country="GB"/>
    </style:style>
    <style:style style:name="P25" style:parent-style-name="Normal" style:family="paragraph">
      <style:text-properties fo:language="en" fo:country="GB"/>
    </style:style>
    <style:style style:name="P26" style:parent-style-name="Normal" style:family="paragraph">
      <style:text-properties fo:language="en" fo:country="GB"/>
    </style:style>
    <style:style style:name="P27" style:parent-style-name="Paragraphedeliste" style:list-style-name="LFO1" style:family="paragraph"/>
    <style:style style:name="P28" style:parent-style-name="Paragraphedeliste" style:list-style-name="LFO1" style:family="paragraph"/>
    <style:style style:name="P29" style:parent-style-name="Paragraphedeliste" style:list-style-name="LFO1" style:family="paragraph">
      <style:text-properties fo:language="en" fo:country="GB"/>
    </style:style>
    <style:style style:name="P30" style:parent-style-name="Paragraphedeliste" style:list-style-name="LFO1" style:family="paragraph"/>
    <style:style style:name="P31" style:parent-style-name="Paragraphedeliste" style:list-style-name="LFO1" style:family="paragraph"/>
    <style:style style:name="P32" style:parent-style-name="Paragraphedeliste" style:list-style-name="LFO1" style:family="paragraph"/>
    <style:style style:name="P33" style:parent-style-name="Paragraphedeliste" style:list-style-name="LFO1" style:family="paragraph"/>
    <style:style style:name="P34" style:parent-style-name="Normal" style:family="paragraph">
      <style:paragraph-properties fo:margin-left="2.4666in">
        <style:tab-stops/>
      </style:paragraph-properties>
    </style:style>
    <style:style style:name="P35" style:parent-style-name="Paragraphedeliste" style:list-style-name="LFO1" style:family="paragraph"/>
    <style:style style:name="P36" style:parent-style-name="Paragraphedeliste" style:family="paragraph">
      <style:text-properties fo:language="en" fo:country="GB"/>
    </style:style>
    <style:style style:name="P37" style:parent-style-name="Paragraphedeliste" style:family="paragraph">
      <style:text-properties fo:language="en" fo:country="GB"/>
    </style:style>
    <style:style style:name="P38" style:parent-style-name="Paragraphedeliste" style:family="paragraph">
      <style:text-properties fo:language="en" fo:country="GB"/>
    </style:style>
    <style:style style:name="P39" style:parent-style-name="Paragraphedeliste" style:family="paragraph">
      <style:text-properties fo:language="en" fo:country="GB"/>
    </style:style>
    <style:style style:name="P40" style:parent-style-name="Paragraphedeliste" style:list-style-name="LFO1" style:family="paragraph"/>
    <style:style style:name="P41" style:parent-style-name="Paragraphedeliste" style:family="paragraph">
      <style:text-properties fo:language="en" fo:country="GB"/>
    </style:style>
    <style:style style:name="P42" style:parent-style-name="Paragraphedeliste" style:family="paragraph">
      <style:text-properties fo:language="en" fo:country="GB"/>
    </style:style>
    <style:style style:name="P43" style:parent-style-name="Paragraphedeliste" style:family="paragraph">
      <style:text-properties fo:language="en" fo:country="GB"/>
    </style:style>
    <style:style style:name="P44" style:parent-style-name="Paragraphedeliste" style:family="paragraph">
      <style:text-properties fo:language="en" fo:country="GB"/>
    </style:style>
    <style:style style:name="P45" style:parent-style-name="Normal" style:family="paragraph">
      <style:text-properties fo:language="en" fo:country="GB"/>
    </style:style>
    <style:style style:name="P46" style:parent-style-name="Normal" style:family="paragraph">
      <style:text-properties fo:language="en" fo:country="GB"/>
    </style:style>
    <style:style style:name="P47" style:parent-style-name="Normal" style:family="paragraph">
      <style:text-properties fo:language="en" fo:country="GB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Frameworks JavaScript</text:p>
      <text:list text:style-name="LFO1" text:continue-numbering="true">
        <text:list-item>
          <text:p text:style-name="P2">React</text:p>
        </text:list-item>
        <text:list-item>
          <text:p text:style-name="P3">Angular</text:p>
        </text:list-item>
        <text:list-item>
          <text:p text:style-name="P4">Vue.js</text:p>
        </text:list-item>
        <text:list-item>
          <text:p text:style-name="P5">(Ember)</text:p>
        </text:list-item>
        <text:list-item>
          <text:p text:style-name="P6">(Meteor)</text:p>
        </text:list-item>
        <text:list-item>
          <text:p text:style-name="P7">(Backbone)</text:p>
        </text:list-item>
      </text:list>
      <text:p text:style-name="Normal"/>
      <text:list text:style-name="LFO2" text:continue-numbering="true">
        <text:list-item>
          <text:p text:style-name="P8">Installation<text:s/><text:span text:style-name="T9">Create React App</text:span></text:p>
        </text:list-item>
      </text:list>
      <text:p text:style-name="Normal">Create react app : outil automatisé pour créer une base de code (créé par Facebook) == générer un squelette de code</text:p>
      <text:p text:style-name="Normal">Base de code disposant de fonctionnalités et d’outils préconfigurés, permettant de :<text:s/></text:p>
      <text:p text:style-name="Normal">• gérer les différentes dépendances (bibliothèques) utilisées par notre future application ;</text:p>
      <text:p text:style-name="Normal">• optimiser le chargement de notre code dans les navigateurs ;</text:p>
      <text:p text:style-name="Normal">• importer du CSS et des images ;</text:p>
      <text:p text:style-name="Normal">• gérer les différentes versions de JavaScript ;</text:p>
      <text:p text:style-name="Normal"/>
      <text:list text:style-name="LFO2" text:continue-numbering="true">
        <text:list-item>
          <text:p text:style-name="P10">Installation de nodejs</text:p>
        </text:list-item>
      </text:list>
      <text:p text:style-name="Normal">→ package manager (gestionnaire de paquet directement dans le terminal) : npm</text:p>
      <text:p text:style-name="Normal"/>
      <text:list text:style-name="LFO2" text:continue-numbering="true">
        <text:list-item>
          <text:p text:style-name="P11">Créer CRA (Create React App )</text:p>
        </text:list-item>
      </text:list>
      <text:p text:style-name="P12">npx create-react-app nomProjet</text:p>
      <text:p text:style-name="P13"/>
      <text:list text:style-name="LFO2" text:continue-numbering="true">
        <text:list-item>
          <text:p text:style-name="P14">Refactor et organiser les fichiers et dossiers</text:p>
        </text:list-item>
      </text:list>
      <text:p text:style-name="Normal">Package.json : gérer les dépendances (tous les outils permettant de construire notre application), nos scripts qui peuvent être exécutés avec npm, etc.</text:p>
      <text:p text:style-name="Normal">Index.html : template de l’application</text:p>
      <text:p text:style-name="Normal">Index.js : initialiser notre application React. C'est ici que l'application React est rendue dans le DOM, c'est-à-dire insérée dans la page HTML</text:p>
      <text:p text:style-name="Normal">App.js : C’est le premier composant React</text:p>
      <text:p text:style-name="Normal"/>
      <text:list text:style-name="LFO2" text:continue-numbering="true">
        <text:list-item>
          <text:p text:style-name="P15">Démarrer application</text:p>
        </text:list-item>
      </text:list>
      <text:p text:style-name="Normal">npm start → démarrer en mode développement</text:p>
      <text:p text:style-name="Normal">dans infex.js</text:p>
      <text:list text:style-name="LFO1" text:continue-numbering="true">
        <text:list-item>
          <text:p text:style-name="P16">React : API qui permettra de gérer des composants</text:p>
        </text:list-item>
        <text:list-item>
          <text:p text:style-name="P17">React DOM : API qui est responsable de générer des composants dans le DOM</text:p>
        </text:list-item>
      </text:list>
      <text:p text:style-name="Normal"/>
      <text:p text:style-name="Normal"><text:span text:style-name="T18">DOM</text:span> : Document Object Model → permet d'accéder aux éléments d’une page web, puis de les modifier avec le langage JavaScript.</text:p>
      <text:p text:style-name="Normal"><draw:frame draw:z-index="251658240" draw:style-name="a0" draw:name="Image 1" text:anchor-type="paragraph" svg:x="-0.23403in" svg:y="0.01042in" svg:width="3.70249in" svg:height="2.71667in" style:rel-width="scale" style:rel-height="scale"><draw:image xlink:href="media/image1.png" xlink:type="simple" xlink:show="embed" xlink:actuate="onLoad"/><svg:title/><svg:desc/></draw:frame>Le DOM représente la structure la page web sous la forme d'un arbre hiérarchique. Chaque élément HTML (comme des balises &lt;div&gt;, &lt;p&gt;, &lt;h1&gt;, etc.) est un nœud dans cet arbre.</text:p>
      <text:p text:style-name="Normal">Dans le DOM, on commence toujours par un élément racine qui est le point de départ du document : la balise &lt;html&gt; . Celle-ci a pour enfants les balises &lt;head&gt; et &lt;body&gt;, etc</text:p>
      <text:p text:style-name="Normal"/>
      <text:p text:style-name="Normal"/>
      <text:p text:style-name="Normal"/>
      <text:p text:style-name="Normal">Technos</text:p>
      <text:list text:style-name="LFO1" text:continue-numbering="true">
        <text:list-item>
          <text:p text:style-name="P19">Javascript</text:p>
        </text:list-item>
        <text:list-item>
          <text:p text:style-name="P20">React (html, css, nodejs)</text:p>
        </text:list-item>
      </text:list>
      <text:p text:style-name="Normal"/>
      <text:p text:style-name="P21">Nommage camel case (decla variable) :</text:p>
      <text:list text:style-name="LFO1" text:continue-numbering="true">
        <text:list-item>
          <text:p text:style-name="P22">Let nomVar = 2;</text:p>
        </text:list-item>
        <text:list-item>
          <text:p text:style-name="P23">Const nomVar = 20;</text:p>
        </text:list-item>
      </text:list>
      <text:list text:style-name="LFO3" text:continue-numbering="true">
        <text:list-item>
          <text:p text:style-name="P24">Pas de decla type necessaire</text:p>
        </text:list-item>
      </text:list>
      <text:p text:style-name="P25"/>
      <text:p text:style-name="P26">React</text:p>
      <text:soft-page-break/>
      <text:list text:style-name="LFO1" text:continue-numbering="true">
        <text:list-item>
          <text:p text:style-name="P27">{} pour manipuler les données dans des balises</text:p>
        </text:list-item>
        <text:list-item>
          <text:p text:style-name="P28">${} pour dsans un string</text:p>
        </text:list-item>
        <text:list-item>
          <text:p text:style-name="P29">{/* … */} pour commenter du code</text:p>
        </text:list-item>
        <text:list-item>
          <text:p text:style-name="P30">console.log("essai") pour afficher les log dans la console de la page web</text:p>
        </text:list-item>
        <text:list-item>
          <text:p text:style-name="P31">persone.name pour accéder au propriété/attribut</text:p>
        </text:list-item>
        <text:list-item>
          <text:p text:style-name="P32">les classiques &amp;&amp; || !<text:s/></text:p>
        </text:list-item>
        <text:list-item>
          <text:p text:style-name="P33">… pour étendre un objet const array1 = [1, 2, 3] ;</text:p>
        </text:list-item>
      </text:list>
      <text:p text:style-name="P34">Array2 = […array1, 4, 5] ;</text:p>
      <text:list text:style-name="LFO1" text:continue-numbering="true">
        <text:list-item>
          <text:p text:style-name="P35">… pour passer un nombre dariable d’arguments à une fonction</text:p>
        </text:list-item>
      </text:list>
      <text:p text:style-name="P36">function sum(a, b, c) {</text:p>
      <text:p text:style-name="P37">return a + b + c;</text:p>
      <text:p text:style-name="P38">}</text:p>
      <text:p text:style-name="P39">const numbers = [1, 2, 3];</text:p>
      <text:p text:style-name="Paragraphedeliste">const total = sum(...numbers);</text:p>
      <text:list text:style-name="LFO1" text:continue-numbering="true">
        <text:list-item>
          <text:p text:style-name="P40">=&gt; définir des fonctions anonymes</text:p>
        </text:list-item>
      </text:list>
      <text:p text:style-name="P41">// Fonction normale</text:p>
      <text:p text:style-name="P42">function add(a, b) {</text:p>
      <text:p text:style-name="P43">return a + b;</text:p>
      <text:p text:style-name="Paragraphedeliste">}</text:p>
      <text:p text:style-name="Paragraphedeliste">// Fonction fléchée équivalente</text:p>
      <text:p text:style-name="P44">const addArrow = (a, b) =&gt; a + b;</text:p>
      <text:p text:style-name="P45"/>
      <text:p text:style-name="P46"/>
      <text:p text:style-name="P47"/>
      <text:p text:style-name="Normal">un évite les enfant/parent triangle ?</text:p>
      <text:p text:style-name="Normal">c’est pas très optimal de faire passer le props par le parents pour qu’il soit ensuite …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DengXian Light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DengXian Light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DengXian Light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DengXian Light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DengXian Light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DengXian Light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DengXian Light" style:font-name-complex="Times New Roman" fo:color="#0F4761"/>
    </style:style>
    <style:style style:name="Titre6Car" style:display-name="Titre 6 Car" style:family="text" style:parent-style-name="Policepardéfaut">
      <style:text-properties style:font-name-asian="DengXian Light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DengXian Light" style:font-name-complex="Times New Roman" fo:color="#595959"/>
    </style:style>
    <style:style style:name="Titre8Car" style:display-name="Titre 8 Car" style:family="text" style:parent-style-name="Policepardéfaut">
      <style:text-properties style:font-name-asian="DengXian Light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DengXian Light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DengXian Light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DengXian Light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DengXia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Wingdings" style:font-name-asian="DengXian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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ERSOIR Caroline</meta:initial-creator>
    <dc:creator>DERSOIR Caroline</dc:creator>
    <meta:creation-date>2026-02-25T13:51:00Z</meta:creation-date>
    <dc:date>2026-03-09T13:48:00Z</dc:date>
    <meta:template xlink:href="Normal.dotm" xlink:type="simple"/>
    <meta:editing-cycles>34</meta:editing-cycles>
    <meta:editing-duration>PT10500S</meta:editing-duration>
    <meta:document-statistic meta:page-count="3" meta:paragraph-count="5" meta:word-count="422" meta:character-count="2741" meta:row-count="19" meta:non-whitespace-character-count="2324"/>
  </office:meta>
</office:document-meta>
</file>